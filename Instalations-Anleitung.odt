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language="de" fo:country="DE"/>
    </style:style>
    <style:style style:name="P2" style:family="paragraph" style:parent-style-name="Heading_20_2">
      <style:paragraph-properties fo:margin-top="0in" fo:margin-bottom="0.0972in" style:contextual-spacing="false" fo:line-height="115%"/>
      <style:text-properties style:font-name="Arial" fo:font-size="12pt" fo:language="de" fo:country="DE" style:font-size-asian="12pt" style:font-size-complex="12pt"/>
    </style:style>
    <style:style style:name="P3" style:family="paragraph" style:parent-style-name="Text_20_body">
      <style:text-properties style:font-name="Arial" fo:font-size="11pt" fo:language="de" fo:country="DE" style:font-size-asian="11pt" style:font-size-complex="11pt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style:font-name="Arial" fo:font-size="11pt" fo:language="de" fo:country="DE" style:font-size-asian="11pt" style:font-size-complex="11pt"/>
    </style:style>
    <style:style style:name="P5" style:family="paragraph" style:parent-style-name="Text_20_body" style:list-style-name="L1">
      <style:text-properties style:font-name="Arial" fo:font-size="11pt" fo:language="de" fo:country="DE" style:font-size-asian="11pt" style:font-size-complex="11pt"/>
    </style:style>
    <style:style style:name="P6" style:family="paragraph" style:parent-style-name="Text_20_body">
      <style:paragraph-properties fo:line-height="100%"/>
      <style:text-properties style:font-name="Arial" fo:font-size="11pt" fo:language="de" fo:country="DE" style:font-size-asian="11pt" style:font-size-complex="11pt"/>
    </style:style>
    <style:style style:name="P7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/>
      <style:text-properties style:font-name="Arial" fo:font-size="11pt" officeooo:paragraph-rsid="0018d7a5" style:font-size-asian="11pt" style:font-size-complex="11pt"/>
    </style:style>
    <style:style style:name="P8" style:family="paragraph" style:parent-style-name="Preformatted_20_Text">
      <style:paragraph-properties fo:margin-top="0in" fo:margin-bottom="0.0972in" style:contextual-spacing="false" fo:line-height="115%"/>
      <style:text-properties style:font-name="Arial" fo:font-size="11pt" officeooo:paragraph-rsid="001a3432" style:font-size-asian="11pt" style:font-size-complex="11pt"/>
    </style:style>
    <style:style style:name="P9" style:family="paragraph" style:parent-style-name="Heading_20_2">
      <style:paragraph-properties fo:margin-top="0in" fo:margin-bottom="0.0972in" style:contextual-spacing="false" fo:line-height="100%"/>
      <style:text-properties style:font-name="Arial" fo:font-size="12pt" fo:language="de" fo:country="DE" style:font-size-asian="12pt" style:font-size-complex="12pt"/>
    </style:style>
    <style:style style:name="P10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/>
      <style:text-properties style:font-name="Arial" fo:font-size="11pt" style:font-size-asian="11pt" style:font-size-complex="11pt"/>
    </style:style>
    <style:style style:name="P11" style:family="paragraph" style:parent-style-name="Text_20_body">
      <style:text-properties style:font-name="Arial" fo:font-size="11pt" style:font-size-asian="11pt" style:font-size-complex="11pt"/>
    </style:style>
    <style:style style:name="T1" style:family="text">
      <style:text-properties officeooo:rsid="0018d7a5"/>
    </style:style>
    <style:style style:name="T2" style:family="text">
      <style:text-properties style:font-name="Arial" fo:language="de" fo:country="DE"/>
    </style:style>
    <style:style style:name="T3" style:family="text">
      <style:text-properties style:font-name="Arial" fo:language="de" fo:country="DE" officeooo:rsid="0018d7a5"/>
    </style:style>
    <style:style style:name="T4" style:family="text">
      <style:text-properties fo:language="de" fo:country="D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ationsanleitung</text:p>
      <text:h text:style-name="P2" text:outline-level="2"><text:span text:style-name="T1">1</text:span>. Voraussetzungen</text:h>
      <text:p text:style-name="P3">Für die Ausführung des Dashboards wird benötigt:</text:p>
      <text:list text:style-name="L1">
        <text:list-item>
          <text:p text:style-name="P4">Python &gt;<text:span text:style-name="T1">= </text:span>3.1<text:span text:style-name="T1">3</text:span></text:p>
        </text:list-item>
        <text:list-item>
          <text:p text:style-name="P4">Git </text:p>
        </text:list-item>
        <text:list-item>
          <text:p text:style-name="P5">Internetverbindung zur Installation der Python-Bibliotheken </text:p>
        </text:list-item>
      </text:list>
      <text:p text:style-name="P6"><text:s/></text:p>
      <text:h text:style-name="P2" text:outline-level="2"><text:span text:style-name="T1">2</text:span>. <text:span text:style-name="T1">Instalation</text:span></text:h>
      <text:section text:style-name="Sect1" text:name="Section1">
        <text:p text:style-name="P7"><text:span text:style-name="Source_20_Text"><text:span text:style-name="T2">git clone https://github.com/ProfesorCrazy/Python-Study-Dashboard.git</text:span></text:span></text:p>
        <text:p text:style-name="P8"><text:span text:style-name="Source_20_Text"><text:span text:style-name="T2">cd </text:span></text:span><text:span text:style-name="Source_20_Text"><text:span text:style-name="T3"><text:s/></text:span></text:span><text:span text:style-name="Source_20_Text"><text:span text:style-name="T3">Python-Study-Dashboard</text:span></text:span></text:p>
        <text:p text:style-name="P7"><text:bookmark text:name="code-block-viewer"/><text:span text:style-name="Source_20_Text"><text:span text:style-name="T2">python -m venv .venv</text:span></text:span></text:p>
        <text:p text:style-name="P7"><text:bookmark text:name="code-block-viewer Copy 9"/><text:span text:style-name="Source_20_Text"><text:span text:style-name="T2">.venv\Scripts\activate</text:span></text:span></text:p>
        <text:p text:style-name="P7"><text:bookmark text:name="code-block-viewer Copy 10"/><text:span text:style-name="Source_20_Text"><text:span text:style-name="T2">pip install .</text:span></text:span></text:p>
      </text:section>
      <text:h text:style-name="P9" text:outline-level="2"><text:s/></text:h>
      <text:h text:style-name="P2" text:outline-level="2"><text:span text:style-name="T1">3</text:span>. Dashboard starten</text:h>
      <text:p text:style-name="P3">Das Dashboard wird aus dem Projektordner heraus gestartet:</text:p>
      <text:section text:style-name="Sect1" text:name="Section5">
        <text:p text:style-name="P10"><text:bookmark text:name="code-block-viewer Copy 12"/><text:span text:style-name="Source_20_Text"><text:span text:style-name="T2">python main.py</text:span></text:span></text:p>
      </text:section>
      <text:p text:style-name="P11"><text:span text:style-name="T4">Nach dem Start öffnet sich eine Terminal-Oberfläche. Das Dashboard importiert die Studiendaten aus der Datei </text:span><text:span text:style-name="Source_20_Text"><text:span text:style-name="T2">study.json</text:span></text:span><text:span text:style-name="T4">, speichert sie in einer SQLite-Datenbank und zeigt anschließend Studienfortschritt, Modulfortschritte, Prüfungsfortschritte, Notenübersichten und ECTS-Diagramme a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7T12:09:52.340794953</meta:creation-date>
    <dc:date>2026-05-11T08:18:26.465414867</dc:date>
    <meta:editing-duration>PT52M</meta:editing-duration>
    <meta:editing-cycles>2</meta:editing-cycles>
    <meta:generator>LibreOffice/26.2.1.2$Linux_X86_64 LibreOffice_project/8399f6259d8c87f40e7255cdb3c9b958f5e08948</meta:generator>
    <meta:document-statistic meta:table-count="0" meta:image-count="0" meta:object-count="0" meta:page-count="1" meta:paragraph-count="18" meta:word-count="81" meta:character-count="711" meta:non-whitespace-character-count="644"/>
  </office:meta>
</office:document-meta>
</file>